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Pictures/1.png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Text_20_body" style:list-style-name="L1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2">
      <style:paragraph-properties fo:margin-top="0in" fo:margin-bottom="0in"/>
    </style:style>
    <style:style style:name="P11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 style:rel-width="100%"/>
    </style:style>
    <style:style style:name="Table4.A" style:family="table-column">
      <style:table-column-properties style:rel-column-width="32767*"/>
    </style:style>
    <style:style style:name="Table4.B" style:family="table-column">
      <style:table-column-properties style:rel-column-width="32767*"/>
    </style:style>
  </office:automatic-styles>
  <office:body>
    <office:text>
      <text:p text:style-name="Title">Week 08 影像辨識成果報告</text:p>
      <text:p text:style-name="Subtitle">手寫數字 1–5 分類模型（Personal Image Classifier）</text:p>
      <text:p text:style-name="Author">智慧機器人學與應用</text:p>
      <text:p text:style-name="Date">2026-04-17</text:p>
      <text:table-of-content>
        <text:table-of-content-source text:outline-level="2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一任務目標"/>一、任務目標<text:bookmark-end text:name="一任務目標"/></text:h>
      <text:p text:style-name="First_20_paragraph">本週以 <text:span text:style-name="T1">監督式學習</text:span> 為核心，使用 MIT App Inventor 提供之 <text:span text:style-name="T1">Personal Image Classifier (PIC)</text:span> 工具，訓練一個可辨識手寫數字 1–5 的影像分類模 型，做為後續自駕車<text:span text:style-name="T1">視覺指令辨識</text:span>（數字紙卡當作行進指令）的原型。</text:p>
      <text:p text:style-name="Text_20_body">模型將匯出 <text:span text:style-name="Source_Text">.mdl</text:span> 檔，後續整合至 App Inventor 手機應用程式，並透過藍牙 連線至 ESP32 控制車體。</text:p>
      <text:p text:style-name="Horizontal_20_Line"/>
      <text:h text:style-name="Heading_20_1" text:outline-level="1"><text:bookmark-start text:name="二方法論"/>二、方法論<text:bookmark-end text:name="二方法論"/></text:h>
      <text:h text:style-name="Heading_20_2" text:outline-level="2"><text:bookmark-start text:name="學習範式"/>2.1 學習範式<text:bookmark-end text:name="學習範式"/></text:h>
      <text:p text:style-name="First_20_paragraph">採 <text:span text:style-name="T1">監督式學習（supervised learning）</text:span>：</text:p>
      <text:p text:style-name="P1">輸入 (X) <text:s text:c="11"/>標籤 (y)</text:p>
      <text:p text:style-name="P2">車頭視角的手寫數字 <text:s text:c="2"/>"1" / "2" / ... / "5" / "other"</text:p>
      <text:p text:style-name="P3">影像 (100×100 px)</text:p>
      <text:h text:style-name="Heading_20_2" text:outline-level="2"><text:bookmark-start text:name="模型架構"/>2.2 模型架構<text:bookmark-end text:name="模型架構"/></text:h>
      <text:p text:style-name="First_20_paragraph">使用 <text:span text:style-name="T1">遷移學習（transfer learning）</text:span>，以 MobileNet 作為凍結的特徵萃 取器，在其上訓練客製化的分類頭。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項目</text:p>
            </table:table-cell>
            <table:table-cell table:style-name="TableHeaderRowCell" office:value-type="string">
              <text:p text:style-name="Table_20_Heading">內容</text:p>
            </table:table-cell>
          </table:table-row>
        </table:table-header-rows>
        <table:table-row>
          <table:table-cell table:style-name="TableRowCell" office:value-type="string">
            <text:p text:style-name="Table_20_Contents">Backbone</text:p>
          </table:table-cell>
          <table:table-cell table:style-name="TableRowCell" office:value-type="string">
            <text:p text:style-name="Table_20_Contents"><text:span text:style-name="Source_Text">MobileNet v1 (width=0.25, input=224)</text:span></text:p>
          </table:table-cell>
        </table:table-row>
        <table:table-row>
          <table:table-cell table:style-name="TableRowCell" office:value-type="string">
            <text:p text:style-name="Table_20_Contents">特徵擷取層</text:p>
          </table:table-cell>
          <table:table-cell table:style-name="TableRowCell" office:value-type="string">
            <text:p text:style-name="Table_20_Contents"><text:span text:style-name="Source_Text">conv_pw_13_relu</text:span></text:p>
          </table:table-cell>
        </table:table-row>
        <table:table-row>
          <table:table-cell table:style-name="TableRowCell" office:value-type="string">
            <text:p text:style-name="Table_20_Contents">分類頭</text:p>
          </table:table-cell>
          <table:table-cell table:style-name="TableRowCell" office:value-type="string">
            <text:p text:style-name="Table_20_Contents">全連接層（由 PIC 自動建立）</text:p>
          </table:table-cell>
        </table:table-row>
        <table:table-row>
          <table:table-cell table:style-name="TableRowCell" office:value-type="string">
            <text:p text:style-name="Table_20_Contents">輸出類別數</text:p>
          </table:table-cell>
          <table:table-cell table:style-name="TableRowCell" office:value-type="string">
            <text:p text:style-name="Table_20_Contents">6</text:p>
          </table:table-cell>
        </table:table-row>
        <table:table-row>
          <table:table-cell table:style-name="TableRowCell" office:value-type="string">
            <text:p text:style-name="Table_20_Contents">模型大小</text:p>
          </table:table-cell>
          <table:table-cell table:style-name="TableRowCell" office:value-type="string">
            <text:p text:style-name="Table_20_Contents">148 KB</text:p>
          </table:table-cell>
        </table:table-row>
        <table:table-row>
          <table:table-cell table:style-name="TableRowCell" office:value-type="string">
            <text:p text:style-name="Table_20_Contents">部署格式</text:p>
          </table:table-cell>
          <table:table-cell table:style-name="TableRowCell" office:value-type="string">
            <text:p text:style-name="Table_20_Contents">TensorFlow.js（<text:span text:style-name="Source_Text">.mdl</text:span> 內含 4 檔案）</text:p>
          </table:table-cell>
        </table:table-row>
      </table:table>
      <text:h text:style-name="Heading_20_2" text:outline-level="2"><text:bookmark-start text:name="訓練環境"/>2.3 訓練環境<text:bookmark-end text:name="訓練環境"/></text:h>
      <text:p text:style-name="First_20_paragraph">PIC 工具完全執行於瀏覽器端，使用 TensorFlow.js + WebGL 於學生本機計算， 無資料上傳，符合隱私保護原則。</text:p>
      <text:p text:style-name="Horizontal_20_Line"/>
      <text:h text:style-name="Heading_20_1" text:outline-level="1"><text:bookmark-start text:name="三資料集"/>三、資料集<text:bookmark-end text:name="三資料集"/></text:h>
      <text:h text:style-name="Heading_20_2" text:outline-level="2"><text:bookmark-start text:name="類別設計"/>3.1 類別設計<text:bookmark-end text:name="類別設計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Table_20_Heading">類別</text:p>
            </table:table-cell>
            <table:table-cell table:style-name="TableHeaderRowCell" office:value-type="string">
              <text:p text:style-name="Table_20_Heading">意義</text:p>
            </table:table-cell>
            <table:table-cell table:style-name="TableHeaderRowCell" office:value-type="string">
              <text:p text:style-name="Table_20_Heading">預期車體動作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1</text:span></text:p>
          </table:table-cell>
          <table:table-cell table:style-name="TableRowCell" office:value-type="string">
            <text:p text:style-name="Table_20_Contents">手寫數字 1</text:p>
          </table:table-cell>
          <table:table-cell table:style-name="TableRowCell" office:value-type="string">
            <text:p text:style-name="Table_20_Contents">（待定）</text:p>
          </table:table-cell>
        </table:table-row>
        <table:table-row>
          <table:table-cell table:style-name="TableRowCell" office:value-type="string">
            <text:p text:style-name="Table_20_Contents"><text:span text:style-name="Source_Text">2</text:span></text:p>
          </table:table-cell>
          <table:table-cell table:style-name="TableRowCell" office:value-type="string">
            <text:p text:style-name="Table_20_Contents">手寫數字 2</text:p>
          </table:table-cell>
          <table:table-cell table:style-name="TableRowCell" office:value-type="string">
            <text:p text:style-name="Table_20_Contents">（待定）</text:p>
          </table:table-cell>
        </table:table-row>
        <table:table-row>
          <table:table-cell table:style-name="TableRowCell" office:value-type="string">
            <text:p text:style-name="Table_20_Contents"><text:span text:style-name="Source_Text">3</text:span></text:p>
          </table:table-cell>
          <table:table-cell table:style-name="TableRowCell" office:value-type="string">
            <text:p text:style-name="Table_20_Contents">手寫數字 3</text:p>
          </table:table-cell>
          <table:table-cell table:style-name="TableRowCell" office:value-type="string">
            <text:p text:style-name="Table_20_Contents">（待定）</text:p>
          </table:table-cell>
        </table:table-row>
        <table:table-row>
          <table:table-cell table:style-name="TableRowCell" office:value-type="string">
            <text:p text:style-name="Table_20_Contents"><text:span text:style-name="Source_Text">4</text:span></text:p>
          </table:table-cell>
          <table:table-cell table:style-name="TableRowCell" office:value-type="string">
            <text:p text:style-name="Table_20_Contents">手寫數字 4</text:p>
          </table:table-cell>
          <table:table-cell table:style-name="TableRowCell" office:value-type="string">
            <text:p text:style-name="Table_20_Contents">（待定）</text:p>
          </table:table-cell>
        </table:table-row>
        <table:table-row>
          <table:table-cell table:style-name="TableRowCell" office:value-type="string">
            <text:p text:style-name="Table_20_Contents"><text:span text:style-name="Source_Text">5</text:span></text:p>
          </table:table-cell>
          <table:table-cell table:style-name="TableRowCell" office:value-type="string">
            <text:p text:style-name="Table_20_Contents">手寫數字 5</text:p>
          </table:table-cell>
          <table:table-cell table:style-name="TableRowCell" office:value-type="string">
            <text:p text:style-name="Table_20_Contents">（待定）</text:p>
          </table:table-cell>
        </table:table-row>
        <table:table-row>
          <table:table-cell table:style-name="TableRowCell" office:value-type="string">
            <text:p text:style-name="Table_20_Contents"><text:span text:style-name="Source_Text">other</text:span></text:p>
          </table:table-cell>
          <table:table-cell table:style-name="TableRowCell" office:value-type="string">
            <text:p text:style-name="Table_20_Contents">無數字、其他畫面</text:p>
          </table:table-cell>
          <table:table-cell table:style-name="TableRowCell" office:value-type="string">
            <text:p text:style-name="Table_20_Contents">維持原狀</text:p>
          </table:table-cell>
        </table:table-row>
      </table:table>
      <text:h text:style-name="Heading_20_2" text:outline-level="2"><text:bookmark-start text:name="樣本概覽"/>3.2 樣本概覽<text:bookmark-end text:name="樣本概覽"/></text:h>
      <text:p text:style-name="First_20_paragraph">每類取 5 張訓練樣本如下圖：</text:p>
      <text:p text:style-name="FigureWithCaption"><draw:frame draw:name="img1" svg:width="541.92pt" svg:height="687.84pt"><draw:image xlink:href="Pictures/0.png" xlink:type="simple" xlink:show="embed" xlink:actuate="onLoad"/></draw:frame></text:p>
      <text:p text:style-name="FigureCaption">每類樣本</text:p>
      <text:h text:style-name="Heading_20_2" text:outline-level="2"><text:bookmark-start text:name="類別數量分布"/>3.3 類別數量分布<text:bookmark-end text:name="類別數量分布"/></text:h>
      <text:p text:style-name="First_20_paragraph">資料集共 <text:span text:style-name="T1">238 張</text:span>影像，6 個類別，各類樣本數如下：</text:p>
      <text:p text:style-name="FigureWithCaption"><draw:frame draw:name="img2" svg:width="495.84pt" svg:height="279.84pt"><draw:image xlink:href="Pictures/1.png" xlink:type="simple" xlink:show="embed" xlink:actuate="onLoad"/></draw:frame></text:p>
      <text:p text:style-name="FigureCaption">類別分布</text:p>
      <text:p text:style-name="Text_20_body"><text:span text:style-name="T1">觀察</text:span>：</text:p>
      <text:list text:style-name="L1">
        <text:list-item>
          <text:p text:style-name="P4">數字 1–5 各類介於 40–46 張，分布均勻。</text:p>
        </text:list-item>
        <text:list-item>
          <text:p text:style-name="P4"><text:span text:style-name="Source_Text">other</text:span> 僅 21 張，<text:span text:style-name="T1">明顯少於其他類別</text:span>（低於建議最低 50 張）。</text:p>
        </text:list-item>
        <text:list-item>
          <text:p text:style-name="P4">由於「非指令畫面」的視覺多樣性最大（地板、手、雜物、光影），實務上 <text:span text:style-name="Source_Text">other</text:span> 樣本應<text:span text:style-name="T1">多於</text:span>各指令類，此為後續需補強之處。</text:p>
        </text:list-item>
      </text:list>
      <text:p text:style-name="Horizontal_20_Line"/>
      <text:h text:style-name="Heading_20_1" text:outline-level="1"><text:bookmark-start text:name="四結果"/>四、結果<text:bookmark-end text:name="四結果"/></text:h>
      <text:p text:style-name="First_20_paragraph">目前模型已完成訓練並匯出為 <text:span text:style-name="Source_Text">pic_digits_model_v2.mdl</text:span>，待與 App Inventor 整合後進行實機測試。模型檔案結構：</text:p>
      <text:p text:style-name="P5">pic_digits_model_v2.mdl <text:s text:c="1"/>(zip archive)</text:p>
      <text:p text:style-name="P6">├── model.json <text:s text:c="13"/>← 網路拓撲</text:p>
      <text:p text:style-name="P7">├── model.weights.bin <text:s text:c="6"/>← 權重 (148 KB)</text:p>
      <text:p text:style-name="P8">├── model_labels.json <text:s text:c="6"/>← 標籤對應表</text:p>
      <text:p text:style-name="P9">└── transfer_model.json <text:s text:c="4"/>← 指向 MobileNet base</text:p>
      <text:p text:style-name="Horizontal_20_Line"/>
      <text:h text:style-name="Heading_20_1" text:outline-level="1"><text:bookmark-start text:name="五限制與後續計畫"/>五、限制與後續計畫<text:bookmark-end text:name="五限制與後續計畫"/></text:h>
      <text:h text:style-name="Heading_20_2" text:outline-level="2"><text:bookmark-start text:name="已知限制"/>5.1 已知限制<text:bookmark-end text:name="已知限制"/></text:h>
      <text:list text:style-name="L2">
        <text:list-item>
          <text:p text:style-name="P10"><text:span text:style-name="Source_Text">other</text:span><text:span text:style-name="T1"> 類別樣本不足</text:span>，實戰時可能對無數字畫面誤判為數字，造成 車體誤觸發指令。</text:p>
        </text:list-item>
        <text:list-item>
          <text:p text:style-name="P10"><text:span text:style-name="T1">光源與背景單一</text:span>：多數訓練影像為室內光線下的白紙背景，於不同場 地的泛化能力未知。</text:p>
        </text:list-item>
        <text:list-item>
          <text:p text:style-name="P10"><text:span text:style-name="T1">視角偏差</text:span>：目前拍攝高度接近人眼，與車頭鏡頭（約 5–10 cm）有 差距，需補拍低視角樣本。</text:p>
        </text:list-item>
      </text:list>
      <text:h text:style-name="Heading_20_2" text:outline-level="2"><text:bookmark-start text:name="後續工作week-9-起"/>5.2 後續工作（Week 9 起）<text:bookmark-end text:name="後續工作week-9-起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項目</text:p>
            </table:table-cell>
            <table:table-cell table:style-name="TableHeaderRowCell" office:value-type="string">
              <text:p text:style-name="Table_20_Heading">說明</text:p>
            </table:table-cell>
          </table:table-row>
        </table:table-header-rows>
        <table:table-row>
          <table:table-cell table:style-name="TableRowCell" office:value-type="string">
            <text:p text:style-name="Table_20_Contents">App Inventor 整合</text:p>
          </table:table-cell>
          <table:table-cell table:style-name="TableRowCell" office:value-type="string">
            <text:p text:style-name="Table_20_Contents">匯入 PIC Extension，掛載 <text:span text:style-name="Source_Text">.mdl</text:span>，驗證即時辨識</text:p>
          </table:table-cell>
        </table:table-row>
        <table:table-row>
          <table:table-cell table:style-name="TableRowCell" office:value-type="string">
            <text:p text:style-name="Table_20_Contents">指令對應定義</text:p>
          </table:table-cell>
          <table:table-cell table:style-name="TableRowCell" office:value-type="string">
            <text:p text:style-name="Table_20_Contents">每個數字對應之車體行為（前進、轉向、停止…）</text:p>
          </table:table-cell>
        </table:table-row>
        <table:table-row>
          <table:table-cell table:style-name="TableRowCell" office:value-type="string">
            <text:p text:style-name="Table_20_Contents">藍牙橋接 ESP32</text:p>
          </table:table-cell>
          <table:table-cell table:style-name="TableRowCell" office:value-type="string">
            <text:p text:style-name="Table_20_Contents">依分類結果下達藍牙指令驅動馬達</text:p>
          </table:table-cell>
        </table:table-row>
        <table:table-row>
          <table:table-cell table:style-name="TableRowCell" office:value-type="string">
            <text:p text:style-name="Table_20_Contents"><text:span text:style-name="Source_Text">other</text:span> 補樣本</text:p>
          </table:table-cell>
          <table:table-cell table:style-name="TableRowCell" office:value-type="string">
            <text:p text:style-name="Table_20_Contents">補足 30–50 張多樣化的非指令畫面</text:p>
          </table:table-cell>
        </table:table-row>
        <table:table-row>
          <table:table-cell table:style-name="TableRowCell" office:value-type="string">
            <text:p text:style-name="Table_20_Contents">實車測試</text:p>
          </table:table-cell>
          <table:table-cell table:style-name="TableRowCell" office:value-type="string">
            <text:p text:style-name="Table_20_Contents">紙卡放置於車前，紀錄誤觸發率</text:p>
          </table:table-cell>
        </table:table-row>
      </table:table>
      <text:p text:style-name="Horizontal_20_Line"/>
      <text:h text:style-name="Heading_20_1" text:outline-level="1"><text:bookmark-start text:name="六附件"/>六、附件<text:bookmark-end text:name="六附件"/></text:h>
      <text:p text:style-name="First_20_paragraph">本 ODT 檔案內已嵌入下列附件（位於 <text:span text:style-name="Source_Text">attachments/</text:span>）：</text:p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檔名</text:p>
            </table:table-cell>
            <table:table-cell table:style-name="TableHeaderRowCell" office:value-type="string">
              <text:p text:style-name="Table_20_Heading">內容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pic_digits_dataset_v2.zip</text:span></text:p>
          </table:table-cell>
          <table:table-cell table:style-name="TableRowCell" office:value-type="string">
            <text:p text:style-name="Table_20_Contents">238 張訓練資料（PIC 原始格式，可回匯 PIC 續訓）</text:p>
          </table:table-cell>
        </table:table-row>
        <table:table-row>
          <table:table-cell table:style-name="TableRowCell" office:value-type="string">
            <text:p text:style-name="Table_20_Contents"><text:span text:style-name="Source_Text">pic_digits_model_v2.mdl</text:span></text:p>
          </table:table-cell>
          <table:table-cell table:style-name="TableRowCell" office:value-type="string">
            <text:p text:style-name="Table_20_Contents">已訓練之模型檔（可匯入 App Inventor PIC Extension）</text:p>
          </table:table-cell>
        </table:table-row>
      </table:table>
      <text:h text:style-name="Heading_20_2" text:outline-level="2"><text:bookmark-start text:name="附件取用方式"/>6.1 附件取用方式<text:bookmark-end text:name="附件取用方式"/></text:h>
      <text:p text:style-name="First_20_paragraph">ODT 檔案在底層為 ZIP 壓縮檔，可用以下任一方式取出附件：</text:p>
      <text:p text:style-name="Text_20_body"><text:span text:style-name="T1">方式 A：終端機</text:span></text:p>
      <text:p text:style-name="P11">unzip -j "week08_成果報告.odt" "attachments/*" -d ./attached/</text:p>
      <text:p text:style-name="First_20_paragraph"><text:span text:style-name="T1">方式 B：檔案管理員</text:span> 將檔名 <text:span text:style-name="Source_Text">week08_成果報告.odt</text:span> 複製一份並改名為 <text:span text:style-name="Source_Text">.zip</text:span>，雙擊解壓後進入 <text:span text:style-name="Source_Text">attachments/</text:span> 資料夾取出。</text:p>
      <text:p text:style-name="Text_20_body"><text:span text:style-name="T1">方式 C（macOS）</text:span>：使用 The Unarchiver 直接拖放 <text:span text:style-name="Source_Text">.odt</text:span> 解壓。</text:p>
      <text:p text:style-name="Text_20_body">上述操作<text:span text:style-name="T1">不會</text:span>影響原 ODT 的閱讀與編輯。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TW" fo:font-size="12pt" fo:language="zh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TW" fo:font-size="12pt" fo:hyphenate="false" fo:hyphenation-push-char-count="2" fo:hyphenation-remain-char-count="2" fo:language="zh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 fo:language="zh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 fo:language="zh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9</meta:generator>
    <dc:title>Week 08 影像辨識成果報告</dc:title>
    <dc:description/>
    <dc:subject/>
    <meta:keyword/>
    <dc:language>zh-TW</dc:language>
    <meta:initial-creator>智慧機器人學與應用</meta:initial-creator>
    <dc:creator>智慧機器人學與應用</dc:creator>
    <meta:creation-date>2026-04-17T10:21:43Z</meta:creation-date>
    <dc:date>2026-04-17T10:21:43Z</dc:date>
    <meta:user-defined meta:name="date" meta:value-type="string">2026-04-17</meta:user-defined>
    <meta:user-defined meta:name="subtitle" meta:value-type="string">手寫數字 1–5 分類模型（Personal Image Classifier）</meta:user-defined>
  </office:meta>
</office:document-meta>
</file>